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writing-mode="lr-tb" style:writing-mode-automatic="false"/>
      <style:text-properties officeooo:paragraph-rsid="001ea8cd"/>
    </style:style>
    <style:style style:name="T1" style:family="text">
      <style:text-properties officeooo:rsid="001ea8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rently we are saving the questions in database, and when we make a new assesment a new set of questions gets generated each time. We tought in making a question bank. Something that allows you tell as admin when you are choosing the assesment you want: Do I want to generate new questions, or I want to use recycle questions. <text:line-break/><text:line-break/>In my view right now, questions are made as beginer, intermediate or advance, and that info is stored with the question (it's dificulty). So I think that when an admin is making a new assesment and selects a dificulty and then to use existing questions, the system will be able to locate the many needed existing quesiont of those topics of that dificulty and make an assesment out of that (and if there are not enough questions, should say: "Only this X many questions available for this topic and we will generate total required - X new questions"<text:line-break/><text:line-break/>Also I will like that the questions have some characteristics: "times used in assesments", "% <text:span text:style-name="T1">of times this question is correctly answered</text:span>" <text:span text:style-name="T1">and “% of times this question is wrongly answered”</text:span> . <text:span text:style-name="T1">This will be determing for us, to know which question actually people fail more, and that means is either hard, or tricky, and will help us eventually which questions use more. What do you think about this? <text:line-break/><text:line-break/>Also you will be saving the employee_id, so I am thinking users will use this and log in eventually. And there should be a button in the page: </text:span><text:a xlink:type="simple" xlink:href="http://localhost:5173/client" text:style-name="Internet_20_link" text:visited-style-name="Visited_20_Internet_20_Link"><text:span text:style-name="T1">http://localhost:5173/client</text:span></text:a><text:span text:style-name="T1"> that says “Help me improve” and from there we will have 2 options opening “Improve my weak areas” (in this case all the sumaries of all the assesments take by that person, the box that says for example: Topic, Questions, Score, Average %, will open and the system will make a one and only summary of the last 3 assesments and will suggest an evaluation based on working more the topics that the user fails more ofter), “Help me improve new areas” (in this case, the same sumary of the user will be open and the system will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0T17:25:56.670390500</meta:creation-date>
    <dc:date>2026-06-10T17:34:32.014191600</dc:date>
    <meta:editing-duration>PT8M36S</meta:editing-duration>
    <meta:editing-cycles>1</meta:editing-cycles>
    <meta:document-statistic meta:table-count="0" meta:image-count="0" meta:object-count="0" meta:page-count="1" meta:paragraph-count="1" meta:word-count="355" meta:character-count="1980" meta:non-whitespace-character-count="1621"/>
    <meta:generator>LibreOffice/26.2.3.2$Windows_X86_64 LibreOffice_project/70e089b17412e4cb7773e41413306b17a2328c34</meta:generator>
  </office:meta>
</office:document-meta>
</file>