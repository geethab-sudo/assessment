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indent="0in" style:auto-text-indent="false" style:writing-mode="lr-tb" style:writing-mode-automatic="false"/>
      <style:text-properties officeooo:paragraph-rsid="00246ff1"/>
    </style:style>
    <style:style style:name="P2" style:family="paragraph" style:parent-style-name="Standard">
      <style:paragraph-properties fo:margin-left="0in" fo:margin-right="0in" fo:text-indent="0in" style:auto-text-indent="false" style:writing-mode="lr-tb" style:writing-mode-automatic="false"/>
      <style:text-properties officeooo:paragraph-rsid="001ea8cd"/>
    </style:style>
    <style:style style:name="P3" style:family="paragraph" style:parent-style-name="Text_20_body">
      <style:paragraph-properties fo:margin-left="0in" fo:margin-right="0in" fo:text-indent="0in" style:auto-text-indent="false" style:writing-mode="lr-tb" style:writing-mode-automatic="false"/>
      <style:text-properties officeooo:paragraph-rsid="001ea8cd"/>
    </style:style>
    <style:style style:name="P4" style:family="paragraph" style:parent-style-name="Text_20_body">
      <style:paragraph-properties fo:margin-left="0in" fo:margin-right="0in" fo:text-indent="0in" style:auto-text-indent="false" style:writing-mode="lr-tb"/>
    </style:style>
    <style:style style:name="P5" style:family="paragraph" style:parent-style-name="Standard">
      <style:paragraph-properties fo:margin-left="0in" fo:margin-right="0in" fo:text-indent="0in" style:auto-text-indent="false" style:writing-mode="lr-tb" style:writing-mode-automatic="false"/>
      <style:text-properties officeooo:rsid="002a29b5" officeooo:paragraph-rsid="002a29b5"/>
    </style:style>
    <style:style style:name="P6" style:family="paragraph" style:parent-style-name="Text_20_body">
      <style:paragraph-properties fo:margin-left="0in" fo:margin-right="0in" fo:text-indent="0in" style:auto-text-indent="false" style:writing-mode="lr-tb" style:writing-mode-automatic="false"/>
      <style:text-properties officeooo:rsid="002a29b5" officeooo:paragraph-rsid="002a29b5"/>
    </style:style>
    <style:style style:name="P7" style:family="paragraph" style:parent-style-name="Text_20_body">
      <style:paragraph-properties fo:margin-left="0in" fo:margin-right="0in" fo:text-indent="0in" style:auto-text-indent="false" style:writing-mode="lr-tb"/>
      <style:text-properties officeooo:rsid="002a29b5"/>
    </style:style>
    <style:style style:name="P8" style:family="paragraph" style:parent-style-name="Text_20_body">
      <style:paragraph-properties fo:margin-left="0in" fo:margin-right="0in" fo:text-indent="0in" style:auto-text-indent="false" style:writing-mode="lr-tb"/>
      <style:text-properties officeooo:rsid="002eb311" officeooo:paragraph-rsid="002eb311"/>
    </style:style>
    <style:style style:name="P9" style:family="paragraph" style:parent-style-name="Standard">
      <style:paragraph-properties fo:margin-left="0in" fo:margin-right="0in" fo:text-indent="0in" style:auto-text-indent="false" style:writing-mode="lr-tb" style:writing-mode-automatic="false"/>
      <style:text-properties officeooo:rsid="00305b7e" officeooo:paragraph-rsid="002a29b5"/>
    </style:style>
    <style:style style:name="P10" style:family="paragraph" style:parent-style-name="Standard">
      <style:paragraph-properties fo:margin-left="0in" fo:margin-right="0in" fo:text-indent="0in" style:auto-text-indent="false" style:writing-mode="lr-tb" style:writing-mode-automatic="false"/>
      <style:text-properties officeooo:rsid="00305b7e" officeooo:paragraph-rsid="0033f79e"/>
    </style:style>
    <style:style style:name="P11" style:family="paragraph" style:parent-style-name="Standard">
      <style:paragraph-properties fo:margin-left="0in" fo:margin-right="0in" fo:text-indent="0in" style:auto-text-indent="false" style:writing-mode="lr-tb" style:writing-mode-automatic="false"/>
      <style:text-properties officeooo:rsid="0033bbef" officeooo:paragraph-rsid="0033f79e"/>
    </style:style>
    <style:style style:name="P12" style:family="paragraph" style:parent-style-name="Text_20_body">
      <style:paragraph-properties fo:margin-left="0in" fo:margin-right="0in" fo:text-indent="0in" style:auto-text-indent="false" style:writing-mode="lr-tb" style:writing-mode-automatic="false"/>
      <style:text-properties officeooo:rsid="0033bbef" officeooo:paragraph-rsid="0033f79e"/>
    </style:style>
    <style:style style:name="P13" style:family="paragraph" style:parent-style-name="Text_20_body">
      <style:paragraph-properties fo:margin-left="0in" fo:margin-right="0in" fo:text-indent="0in" style:auto-text-indent="false" style:writing-mode="lr-tb"/>
      <style:text-properties officeooo:rsid="0033bbef"/>
    </style:style>
    <style:style style:name="P14" style:family="paragraph" style:parent-style-name="Text_20_body">
      <style:text-properties officeooo:rsid="0033bbef"/>
    </style:style>
    <style:style style:name="P15" style:family="paragraph" style:parent-style-name="Text_20_body">
      <style:text-properties officeooo:rsid="0033f79e" officeooo:paragraph-rsid="0033f79e"/>
    </style:style>
    <style:style style:name="P16" style:family="paragraph" style:parent-style-name="Text_20_body">
      <style:paragraph-properties fo:margin-left="0in" fo:margin-right="0in" fo:text-indent="0in" style:auto-text-indent="false" style:writing-mode="lr-tb"/>
      <style:text-properties officeooo:rsid="00355a73" officeooo:paragraph-rsid="00355a73"/>
    </style:style>
    <style:style style:name="P17" style:family="paragraph" style:parent-style-name="Text_20_body">
      <style:paragraph-properties fo:margin-left="0in" fo:margin-right="0in" fo:text-indent="0in" style:auto-text-indent="false" style:writing-mode="lr-tb"/>
      <style:text-properties officeooo:paragraph-rsid="00355a73"/>
    </style:style>
    <style:style style:name="P18" style:family="paragraph" style:parent-style-name="Text_20_body">
      <style:paragraph-properties fo:margin-left="0in" fo:margin-right="0in" fo:text-indent="0in" style:auto-text-indent="false" style:writing-mode="lr-tb"/>
      <style:text-properties officeooo:rsid="00363033" officeooo:paragraph-rsid="00363033"/>
    </style:style>
    <style:style style:name="P19" style:family="paragraph" style:parent-style-name="Text_20_body">
      <style:paragraph-properties fo:margin-left="0in" fo:margin-right="0in" fo:text-indent="0in" style:auto-text-indent="false" style:writing-mode="lr-tb" style:writing-mode-automatic="false"/>
      <style:text-properties officeooo:rsid="00367344" officeooo:paragraph-rsid="00367344"/>
    </style:style>
    <style:style style:name="P20" style:family="paragraph" style:parent-style-name="Text_20_body">
      <style:paragraph-properties fo:margin-left="0in" fo:margin-right="0in" fo:text-indent="0in" style:auto-text-indent="false" style:writing-mode="lr-tb" style:writing-mode-automatic="false"/>
      <style:text-properties officeooo:paragraph-rsid="0038b2ec"/>
    </style:style>
    <style:style style:name="P21" style:family="paragraph" style:parent-style-name="Text_20_body">
      <style:paragraph-properties fo:margin-left="0in" fo:margin-right="0in" fo:text-indent="0in" style:auto-text-indent="false" style:writing-mode="lr-tb"/>
      <style:text-properties officeooo:rsid="0038b2ec" officeooo:paragraph-rsid="0038b2ec"/>
    </style:style>
    <style:style style:name="T1" style:family="text">
      <style:text-properties officeooo:rsid="00273981"/>
    </style:style>
    <style:style style:name="T2" style:family="text">
      <style:text-properties officeooo:rsid="002d4c82"/>
    </style:style>
    <style:style style:name="T3" style:family="text">
      <style:text-properties officeooo:rsid="002eb311"/>
    </style:style>
    <style:style style:name="T4" style:family="text">
      <style:text-properties officeooo:rsid="0032061a"/>
    </style:style>
    <style:style style:name="T5" style:family="text">
      <style:text-properties officeooo:rsid="0032a03d"/>
    </style:style>
    <style:style style:name="T6" style:family="text">
      <style:text-properties officeooo:rsid="0033bbef"/>
    </style:style>
    <style:style style:name="T7" style:family="text">
      <style:text-properties officeooo:rsid="00355a73"/>
    </style:style>
    <style:style style:name="T8" style:family="text">
      <style:text-properties officeooo:rsid="00363033"/>
    </style:style>
    <style:style style:name="T9" style:family="text">
      <style:text-properties officeooo:rsid="0038b2ec"/>
    </style:style>
    <style:style style:name="T10" style:family="text">
      <style:text-properties fo:font-variant="normal" fo:text-transform="none" fo:color="#0f172a" loext:opacity="100%" fo:font-family="'JetBrains Mono', ui-monospace, monospace" fo:font-size="9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ou know... we made a plan for this the other day:</text:p>
      <text:p text:style-name="P1"/>
      <text:p text:style-name="P1">"Currently we are saving the questions in database, and when we make a new assesment a new set of questions gets generated each time. We tought in making a question bank. Something that allows you tell as admin when you are choosing the assesment you want: Do I want to generate new questions, or I want to use recycle questions. </text:p>
      <text:p text:style-name="P2"/>
      <text:p text:style-name="P2">In my view right now, questions are made as beginer, intermediate or advance, and that info is stored with the question (it's dificulty). So I think that when an admin is making a new assesment and selects a dificulty and then to use existing questions, the system will be able to locate the many needed existing quesiont of those topics of that dificulty and make an assesment out of that (and if there are not enough questions, should say: "Only this X many questions available for this topic and we will generate total required - X new questions"</text:p>
      <text:p text:style-name="P2"/>
      <text:p text:style-name="P2">Also I will like that the questions have some characteristics: "times used in assesments", "% of times this question is correctly answered" and “% of times this question is wrongly answered” . This will be determing for us, to know which question actually people fail more, and that means is either hard, or tricky, and will help us eventually which questions use more. What do you think about this? </text:p>
      <text:p text:style-name="P2"/>
      <text:p text:style-name="P2">Also you will be saving the employee_id, so I am thinking users will use this and log in eventually. And there should be a button in the page: http://ulr/client that says “Help me improve” and from there we will have 2 options opening “Improve my weak areas” (in this case all the sumaries of all the assesments take by that person, the box that says for example: Topic, Questions, Score, Average %, will open and the system will make a one and only summary of the last 3 assesments and will suggest an evaluation based on working more the topics that the user fails more ofter), “Help me improve new areas” (in this case, the same sumary of the user will be open and the system will which topics of that programming language the user haven’t explore, so will make an assesment with new topics for that user, using always existing questions), “improve difficulty”(in this case the system will give to that user questions of intermediate and advance level if he have done only easy ones before on the topics he have done before, or only hard ones, if he already have a nice score with the medium questions). "</text:p>
      <text:p text:style-name="P2"/>
      <text:p text:style-name="P2">And then got lost. please write me a plan.md and task.md in how to implement all this, and we will keep those 2 files as a .md so we don't loose them if we loost the chat, ok?</text:p>
      <text:p text:style-name="P2"/>
      <text:p text:style-name="P2">I already manage to include the first change that is saving the questions in the database, check it, and put everything accordingly in the plan.md and task.md files that you <text:s/>will make. </text:p>
      <text:p text:style-name="P2"/>
      <text:p text:style-name="P2">This mission should be modular and separated in stages so is nicely achievable with agentic ai later, ok?</text:p>
      <text:p text:style-name="P2">----------------------------------</text:p>
      <text:p text:style-name="P3">Super well done until now, my team asked for some changes. </text:p>
      <text:p text:style-name="P4">Let's modify the @plan.md and @task.md file so we can make some sort of a roadmap for these adittions. </text:p>
      <text:p text:style-name="Text_20_body"/>
      <text:p text:style-name="P4">1) Do not include coding questions of reading a "text.txt" file, as that file don't exist in the terminal, and the student then will have no way to verify that the function is working correctly (Maybe here we can <text:soft-page-break/>modify the LLM instruction part, to make sure to don't make coding questions, that needs an external file to be read. Basically should be exercises that the student can make the code there, and will be check if it's ok by the LLM) </text:p>
      <text:p text:style-name="P4"/>
      <text:p text:style-name="P4">2) For coding questions, provide a predefined set of test inputs so candidates can validate their solutions against expected results. (can you make something here like saying for the input: XYZ (tipically this will be for problems of making a function) get the ABC output). But here we should not give all the test cases possible to the user, we should let them think in some curious edge cases by themselves (and this should be explicit in the instruction), like make sure you are considering all posible edge cases, beyond the showns in the given test cases. </text:p>
      <text:p text:style-name="Text_20_body"/>
      <text:p text:style-name="P4">This test cases should have a little code snippets windows in the admin/review endpoint, so we can see that is nicely formatted, and not only some LLM halucination (this will also forced the admin to check a bit more the question. And in some case we might not include test cases at all, so include a checkbox before generating the assesment that says "Include test cases in some coding questions" and is by default deactivate it. Test cases should only be in coding questions, and only in questions that involve making a function or a class.</text:p>
      <text:p text:style-name="P4">3) The achieved score out of total can also be displayed after the test. For percentage value out of 100, a decimal value can be displayed out of 1 for each question. Basically display the score in terms from 0,0 to 1,0 for each question instead of 0 to 100. </text:p>
      <text:p text:style-name="P4"/>
      <text:p text:style-name="P4">4) We can still give some hints or examples in the coding questions which helps beginners. Also manage this as a checkbox before clicking in generate assesment. It should by deafault also deactivate it. And the hint should come only for beginner coding questions, at the end of the question like </text:p>
      <text:p text:style-name="P4">"hint: &lt;hint of the problem here&gt;". Should be easily editable by the admin when making the review. <text:span text:style-name="T1">And the hint should never be giving like the full answer, should just be a little help, and you have to stress that to the LLM a lot!!!!</text:span></text:p>
      <text:p text:style-name="Text_20_body"/>
      <text:p text:style-name="P4">5) This might be a bit anbitious for now, but in the folder @certificates I put 4 diplomas. Can you make a system in which when someone either gets more than 85 marks in a preset assesment of beginner, Intermediate or Advanced, get this certificate with their name? If the student reaches to this point succesfully a window should pop up and say: your grade is &lt;grade obtained&gt; and you reached your certificate for Python &lt;difficulty level&gt;, what will you like to be your name on the certificate? And the user put his/her name. </text:p>
      <text:p text:style-name="Text_20_body"/>
      <text:p text:style-name="P4">It should also possible to generate this certificate from the admin portal before clicking into making a preset Assessment of tier 1 (for now exclude the @certificates/Professional-tier2.jpg one). So if the <text:soft-page-break/>Checkbox is marked, what I described earlier will happen at the end of doing succesfully the Assessment, if it's unmark (by Default is unmarked), then it will be an Assessment without certificate. </text:p>
      <text:p text:style-name="Text_20_body"/>
      <text:p text:style-name="P4">I will like that also if a student under particular conditions prooved that he/she earned the certificate, from the admin portal the certificate can be granted to that user, on the performance page of that user, when you see it as admin. <text:span text:style-name="T1">You can select a box “Generate certificate” and will ask you which difficulty level and the name to appeared in the certificate. <text:line-break/><text:line-break/>A last crazy thought on this, I was thinking, can we make it integrable easily in LinkedIn? Like a button, that says “you want to show this in Linkedin?” and if the user clicks yes, somehow it connects and happens? I think this can be like a big last step and maybe keep it in the plan as an optional move for now. </text:span></text:p>
      <text:p text:style-name="P2">---------------</text:p>
      <text:p text:style-name="P3">ok I am checking now, </text:p>
      <text:p text:style-name="P4">- Can be nice that in the input and output case windows, the tab key make the 4 spaces indentation. </text:p>
      <text:p text:style-name="P4">- So I made an assesments wiht hints, but they didnt came into the assesment itself</text:p>
      <text:p text:style-name="P4">- Also I tried the IO topic, and all coding questions, is true that are not requiring to read or write files not accesible outside of the Pyodide terminal, but now is just making questions about other topcis!!! so I want that you make some codign exercises, like "make a python script that writes in either a .txt, .csv or .json file some information. And that it writes line bt line or in a chunk. Also to read information from a file, but making explicit in the questions that make code assuming the file name is &lt;xyz&gt;.&lt;ext&gt; but that the file is not attached in the question"</text:p>
      <text:p text:style-name="P2">-----------</text:p>
      <text:p text:style-name="P5">ok sure, now goes into the stage 10 with the cerficates, but do you see that the certificates, have some fields like name, date, and signature. The first 2 values will be dinamically added (that’s why we are asking the student which name they want to have in the certificate), and the date will be the one of the day. The signature will be a .png file of a signature that we upload in the certificates <text:span text:style-name="T2">called “signature.png”</text:span>. <text:span text:style-name="T2">Can you make some pythonic way to actually write the name of the student where it goes and add the date?</text:span></text:p>
      <text:p text:style-name="P5">------------------------</text:p>
      <text:p text:style-name="P6">ok nice, now I will like to include 2 additions, one is big. </text:p>
      <text:p text:style-name="P7">1) Will like to include the chance <text:span text:style-name="T3">that the user chooses which model to use for the question generation, Grok or Gemini? So I need that you make the needed infraestructure to use Gemini. My idea is to be able to use the 3.5 flash model. I already put an API key in the .env file (we will manage it like that for now I guess). Called GOOGLE_API_KEY1. This model selection will happen in the admin interface when in the Generate Section for a new assesment.</text:span></text:p>
      <text:p text:style-name="P8">2) The big task, is that currently we are using Postgress as Database, and we wanted to move it to MongoDB… and to use MongoDB Atlas Cloud. So can you make that? The idea later is that we can even do easily vectorization of questions, to look similar question, or who knows what (this vectorization thing will not be implemented now, but just mentioning it). So it is healthy to migrate <text:soft-page-break/>now our app to Atlas, and not even depend in a docker instance to make postgres in the cloud server where we are. <text:line-break/><text:line-break/>So to execute all this, I want that as usual, you first make a @task.md and @plan.md (or modify the existing ones) to make a nice plan before executing anything.</text:p>
      <text:p text:style-name="P5">-------------------------</text:p>
      <text:p text:style-name="P9">ok great job! So now my boss was talking about some of the elements in the page <text:a xlink:type="simple" xlink:href="http://localhost:5173/client/my-report?employee_id=C001&amp;period=all_time" text:style-name="Internet_20_link" text:visited-style-name="Visited_20_Internet_20_Link">http://localhost:5173/client/my-report?employee_id=C001&amp;period=all_time</text:a> , for example in the heatmap or radar map, the idea will be that I can click some of the topics and click an option like “improve this topic” (in case we haven’t achieve proficiency superior to 75%) or “step up difficulty for this topic” (in case the student is already doing well in that topic). So let’s say that the student pick either in the heat map or radar, a box will open (only for selecting things in the heat map or in the radarmap) and say: choose the topics you will like to practice more (and again, if the student is not proficient in that area, it will give topics of the difficulty in which he is currently, if he is already very proficient with more than 75%, then he can get harder questions).<text:line-break/><text:line-break/>Same in the section “Unexplored topics (your languages)” will be good that we can pick some topics that we want to explore, and again a box similar to the one described above, will open and said, choose some of the topics you will like to explore. And the student can choose freely there. But Exploring new areas always start as beginner and it is the duty of the student to improve from there. <text:line-break/><text:line-break/>Also include a button next to “Recommendations” called “<text:span text:style-name="T4">Ok let’s do it!</text:span>”, <text:span text:style-name="T4">in which it follows the recommendations, for example it can be like: <text:line-break/><text:line-break/>&lt;Explore Tier 1 - OOP Basics (Classes, Methods, Encapsulation) — not yet covered in your assessment history.</text:span></text:p>
      <text:p text:style-name="P9">Explore Tier 1 - Built-in Iterators &amp; Utilities (enumerate, zip, any, all) — not yet covered in your assessment history.</text:p>
      <text:p text:style-name="P10">Keep momentum in Tier 1 - Logic &amp; Flow Control (Conditionals, Loops, Comprehensions), Tier 1 - Data Structures &amp; Manipulation (Lists, Sets, Strings) while addressing weaker areas.&gt; <text:line-break/><text:line-break/><text:span text:style-name="T4">In that case you will make a default of 10 questions covering the recommendations, and now you understand when to offer which level of difficulty. The idea of this button is to have something like a quick practice.<text:line-break/><text:line-break/>Also at some point when the student is not doing good I </text:span><text:span text:style-name="T5">think in the Python – topics covered section, it said the word “weak” in the topic… avoid that . My boss didn’t like it, change it for “need improvement”. <text:line-break/><text:line-break/>When the user move into the endpoint: </text:span><text:a xlink:type="simple" xlink:href="http://localhost:5173/client/improve?employee_id=C001" text:style-name="Internet_20_link" text:visited-style-name="Visited_20_Internet_20_Link"><text:span text:style-name="T5">http://localhost:5173/client/improve?employee_id=C002</text:span></text:a><text:span text:style-name="T5"> and let;s say it goes in the page: </text:span><text:a xlink:type="simple" xlink:href="http://localhost:5173/client/improve?employee_id=C002&amp;path=weak&amp;language_code=py" text:style-name="Internet_20_link" text:visited-style-name="Visited_20_Internet_20_Link"><text:span text:style-name="T5">http://localhost:5173/client/improve?employee_id=C002&amp;path=weak&amp;language_code=py</text:span></text:a><text:span text:style-name="T5"> First of all, please don’t use the explicit word weak or weak areas, <text:s/>and change it for something more inclusive and less discouraging, from the areas in the box that today is called “Improve my weak areas” will be good that the student can mark those areas that he wants to practice and that they are still below 75%, and then once he clicked the ones he wants he can make an assesment, and he will choose how many questions (Max 15 questions, as we want that this is a sustainable study, rather than a draining out of control, unguided failure). If the </text:span><text:soft-page-break/><text:span text:style-name="T5">student wants also can click the button that says “Help me improve all my areas” and he gets an assesment in all the weak areas he has. In general these assesments of this page, will be 15 questions max, and never more than 5 questions (mcq<text:tab/> and coding combined) of the same topic. <text:line-break/><text:line-break/>If he goes into the page: </text:span><text:a xlink:type="simple" xlink:href="http://localhost:5173/client/improve?employee_id=C002&amp;language_code=py&amp;path=new" text:style-name="Internet_20_link" text:visited-style-name="Visited_20_Internet_20_Link"><text:span text:style-name="T5">http://localhost:5173/client/improve?employee_id=C002&amp;language_code=py&amp;path=new</text:span></text:a><text:span text:style-name="T5"> he can also choose which areas to explore and again, starting always in begineer and maximum 15 questions. You should limit that the student don’t pick more than 5 new topics at once.<text:line-break/>If he goes into: </text:span><text:a xlink:type="simple" xlink:href="http://localhost:5173/client/improve?employee_id=C002&amp;language_code=py&amp;path=difficulty" text:style-name="Internet_20_link" text:visited-style-name="Visited_20_Internet_20_Link"><text:span text:style-name="T5">http://localhost:5173/client/improve?employee_id=C002&amp;language_code=py&amp;path=difficulty</text:span></text:a><text:span text:style-name="T5"> again he can choose the topics he wants to step up, but that he already have achieve the necessary conditions (more than 75% in the previous level of difriculty), and then he can get an assesment. He can choose again, max 5 topics per time, and a max of 15 questions. <text:line-break/><text:line-break/></text:span><text:span text:style-name="T6">Also my boss wants this: Social media certificate sharing The system will incorporate a feature allowing users to share their earned certificates directly to LinkedIn and other social media platforms.</text:span></text:p>
      <text:p text:style-name="P11">----------------</text:p>
      <text:p text:style-name="P12">ok great, so.. some feedback: </text:p>
      <text:p text:style-name="P13">1) when clicking in the heatmap, I can click a topic, but I am not being taken anywhere, then when I close that window I see the checkboxes to mark which assesment and topics, and questions i want... this should go more something like you click one, and that page appears inmediately, so you understand like "oh ok, I am supposed to choose topics or leave from here". Also in that page where you have the checkboxes, align them nicely, right now they are not aligned, so just arrange and rpesent the thing nicely. Remember we are going to be sellling this foor money. </text:p>
      <text:p text:style-name="P14"/>
      <text:p text:style-name="P13">2) I remember that I have run the 2 scripsts @scripts/seed_demo_students.py and @scripts/seed_sample_catalog.py , and now that I tried to make a intermediate python preset assesment, it gave me the message: Missing catalog topics. Run python3 scripts/seed_sample_catalog.py Tier 1 - OOP Basics (Classes, Methods, Encapsulation) Tier 1 - Functions &amp; Dictionaries (Nested lookups, signatures, defaults) Tier 1 - Data Structures &amp; Manipulation (Lists, Sets, Strings) Tier 1 - Built-in Iterators &amp; Utilities (enumerate, zip, any, all) Tier 1 - Basic File I/O &amp; Context Managers (with open statements) Tier 1 - Error Handling (Basic try-except, raising exceptions) Tier 1 - Testing (unittest, pytest)</text:p>
      <text:p text:style-name="P14"/>
      <text:p text:style-name="P13">Why is this? are you know kind of deleteing that from database?</text:p>
      <text:p text:style-name="P15">3) I am getting this in the frontend terminal: : use --host to expose</text:p>
      <text:p text:style-name="P15"><text:s text:c="2"/>➜ <text:s/>press h + enter to show help</text:p>
      <text:p text:style-name="P15">11:21:11 AM [vite] http proxy error: /client/my-report?employee_id=C002&amp;period=all_time</text:p>
      <text:p text:style-name="P15">Error: socket hang up</text:p>
      <text:p text:style-name="P15"><text:s text:c="4"/>at Socket.socketOnEnd (node:_http_client:599:25)</text:p>
      <text:p text:style-name="P15"><text:soft-page-break/><text:s text:c="4"/>at Socket.emit (node:events:531:35)</text:p>
      <text:p text:style-name="P15"><text:s text:c="4"/>at endReadableNT (node:internal/streams/readable:1698:12)</text:p>
      <text:p text:style-name="P15"><text:s text:c="4"/>at process.processTicksAndRejections (node:internal/process/task_queues:89:21)</text:p>
      <text:p text:style-name="P15">11:21:11 AM [vite] http proxy error: /client/my-report?employee_id=C002&amp;period=all_time</text:p>
      <text:p text:style-name="P15">Error: connect ECONNREFUSED 127.0.0.1:8000</text:p>
      <text:p text:style-name="P15"><text:s text:c="4"/>at TCPConnectWrap.afterConnect [as oncomplete] (node:net:1631:16)</text:p>
      <text:p text:style-name="P15">when trying to go to the page in the app: <text:a xlink:type="simple" xlink:href="http://localhost:5173/client/my-report?employee_id=C002" text:style-name="Internet_20_link" text:visited-style-name="Visited_20_Internet_20_Link">http://localhost:5173/client/my-report?employee_id=C002</text:a></text:p>
      <text:p text:style-name="P15"/>
      <text:p text:style-name="P13">--------------------------</text:p>
      <text:p text:style-name="P16">1) In the endpoint <text:a xlink:type="simple" xlink:href="http://localhost:5173/client/topic-practice" text:style-name="Internet_20_link" text:visited-style-name="Visited_20_Internet_20_Link">http://localhost:5173/client/topic-practice</text:a>, the “back to report” button is just too close to the title “Guided practice”, just make a little space there. </text:p>
      <text:p text:style-name="P17"><text:span text:style-name="T7">2) In the box, where you have the title “&lt;Language&gt;  — topics covered”, include also that if you click any of those topics you can also make an assesment from there, in the same concept and way than the heatmap or the radar map. <text:line-break/><text:line-break/>3) In the endpoint, </text:span><text:a xlink:type="simple" xlink:href="http://localhost:5173/client/topic-practice" text:style-name="Internet_20_link" text:visited-style-name="Visited_20_Internet_20_Link"><text:span text:style-name="T7">http://localhost:5173/client/topic-practice</text:span></text:a><text:span text:style-name="T7"> remove the button “Select all”, it just doesn’t make sense at all.<text:line-break/><text:line-break/></text:span><text:span text:style-name="T8">4) When we said share link for a certificate, we should have a Coursera-like page where you can go and they said, yes, this person got this certificate, and you know is real, and we hosted in our page somehow. Makes sense? In that case then will make a bit more sense to include the QR code I guess</text:span></text:p>
      <text:p text:style-name="P18">5) ok when getting the certificate, and I click in Share in LinkedIn, is asking me the info:</text:p>
      <text:p text:style-name="P18">- Issue date: can you autofill that? In today’s month and year<text:line-break/>- Expiration date: leave that blank<text:line-break/>- Credential URL: this is what we have to fix that I ask you in point 4, we have to hosted somewhere, and that the certificates are always verifiable there, makes sense?</text:p>
      <text:p text:style-name="P18">- Skills: Please suggest some nice skills there automatically</text:p>
      <text:p text:style-name="P18">- Media: Can you automatically pull the certificate, from where it was saved? When you add the media, you need to add title and description, can you make that up also for each certificate we have?</text:p>
      <text:p text:style-name="P18">--------------------</text:p>
      <text:p text:style-name="P19">1) When I put my name to generate certificate, the page looks so weird after. Can you make that, this page looks nice?<text:line-break/>2) Once opened Linkedin, the Issuing organization* should be for us Wekan Enterprise Solutions, but this is an institution defined in the admin portal. <text:line-break/>3) You are pending to make a brief description in the url where we verify the certificate. </text:p>
      <text:p text:style-name="P19"><text:soft-page-break/>-------------------</text:p>
      <text:p text:style-name="P20"><text:span text:style-name="T9">1) Weirdly now in the cloud deployed version, (that you can access in the db with the assesment ID ASM-RK9SVRP5) when I get the certificate and click in “copy verification link” I get copied in the clipboard: </text:span><text:span text:style-name="T10">ASM-RK9SVRP5</text:span> <text:span text:style-name="T9">instead of the url of the page where I can send it to someone to check it out. </text:span></text:p>
      <text:p text:style-name="P21">And the Credential URL is still: <text:a xlink:type="simple" xlink:href="http://localhost:5173/verify/certificate/3" text:style-name="Internet_20_link" text:visited-style-name="Visited_20_Internet_20_Link">http://localhost:5173/verify/certificate/3</text:a> but now my cloud url is: <text:a xlink:type="simple" xlink:href="http://ec2-54-226-73-84.compute-1.amazonaws.com/client" text:style-name="Internet_20_link" text:visited-style-name="Visited_20_Internet_20_Link">http://ec2-54-226-73-84.compute-1.amazonaws.com/client</text:a> so this should be adapted, don’t you think?</text:p>
      <text:p text:style-name="P18"/>
      <text:p text:style-name="P16"/>
      <text:p text:style-name="P11"><text:line-break/><text:line-break/><text:line-break/><text:line-break/></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0T17:25:56.670390500</meta:creation-date>
    <dc:date>2026-06-29T17:14:55.561903700</dc:date>
    <meta:editing-duration>P3DT16H36M42S</meta:editing-duration>
    <meta:editing-cycles>10</meta:editing-cycles>
    <meta:generator>LibreOffice/26.2.4.2$Windows_X86_64 LibreOffice_project/0229ac93fcf0d7cbc6376066c6f35021cef002dc</meta:generator>
    <meta:document-statistic meta:table-count="0" meta:image-count="0" meta:object-count="0" meta:page-count="7" meta:paragraph-count="65" meta:word-count="3126" meta:character-count="18273" meta:non-whitespace-character-count="15135"/>
  </office:meta>
</office:document-meta>
</file>